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T11" style:parent-style-name="Absatz-Standardschriftart" style:family="text">
      <style:text-properties fo:font-weight="bold" style:font-weight-asian="bold" style:font-weight-complex="bold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P15" style:parent-style-name="Standard" style:list-style-name="LFO2" style:family="paragraph"/>
    <style:style style:name="T16" style:parent-style-name="Absatz-Standardschriftart" style:family="text">
      <style:text-properties fo:font-weight="bold" style:font-weight-asian="bold" style:font-weight-complex="bold"/>
    </style:style>
    <style:style style:name="P17" style:parent-style-name="Standard" style:list-style-name="LFO2" style:family="paragraph"/>
    <style:style style:name="T18" style:parent-style-name="Absatz-Standardschriftart" style:family="text">
      <style:text-properties fo:font-weight="bold" style:font-weight-asian="bold" style:font-weight-complex="bold"/>
    </style:style>
    <style:style style:name="P19" style:parent-style-name="Standard" style:list-style-name="LFO2" style:family="paragraph"/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Standard" style:list-style-name="LFO2" style:family="paragraph"/>
    <style:style style:name="T22" style:parent-style-name="Absatz-Standardschriftart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/>
    <style:style style:name="T24" style:parent-style-name="Absatz-Standardschriftart" style:family="text">
      <style:text-properties fo:font-weight="bold" style:font-weight-asian="bold" style:font-weight-complex="bold"/>
    </style:style>
    <style:style style:name="P25" style:parent-style-name="Standard" style:list-style-name="LFO2" style:family="paragraph"/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Standard" style:list-style-name="LFO2" style:family="paragraph"/>
    <style:style style:name="T28" style:parent-style-name="Absatz-Standardschriftart" style:family="text">
      <style:text-properties fo:font-weight="bold" style:font-weight-asian="bold" style:font-weight-complex="bold"/>
    </style:style>
    <style:style style:name="T29" style:parent-style-name="Absatz-Standardschriftar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Absatz-Standardschriftart" style:family="text">
      <style:text-properties fo:font-weight="bold" style:font-weight-asian="bold" style:font-weight-complex="bold"/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list-style-name="LFO3" style:family="paragraph"/>
    <style:style style:name="P36" style:parent-style-name="Standard" style:list-style-name="LFO3" style:family="paragraph"/>
    <style:style style:name="P37" style:parent-style-name="Standard" style:list-style-name="LFO3" style:family="paragraph"/>
    <style:style style:name="P38" style:parent-style-name="Standard" style:list-style-name="LFO3" style:family="paragraph"/>
    <style:style style:name="P39" style:parent-style-name="Standard" style:list-style-name="LFO3" style:family="paragraph"/>
    <style:style style:name="P40" style:parent-style-name="Standard" style:list-style-name="LFO4" style:family="paragraph"/>
    <style:style style:name="P41" style:parent-style-name="Standard" style:list-style-name="LFO4" style:family="paragraph"/>
    <style:style style:name="P42" style:parent-style-name="Standard" style:list-style-name="LFO4" style:family="paragraph"/>
    <style:style style:name="P43" style:parent-style-name="Standard" style:list-style-name="LFO4" style:family="paragraph"/>
    <style:style style:name="P44" style:parent-style-name="Standard" style:list-style-name="LFO4" style:family="paragraph"/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T47" style:parent-style-name="Absatz-Standardschriftart" style:family="text">
      <style:text-properties fo:font-weight="bold" style:font-weight-asian="bold" style:font-weight-complex="bold"/>
    </style:style>
    <style:style style:name="P48" style:parent-style-name="Standard" style:list-style-name="LFO5" style:family="paragraph"/>
    <style:style style:name="P49" style:parent-style-name="Standard" style:list-style-name="LFO5" style:family="paragraph"/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list-style-name="LFO6" style:family="paragraph"/>
    <style:style style:name="P52" style:parent-style-name="Standard" style:list-style-name="LFO6" style:family="paragraph"/>
    <style:style style:name="P53" style:parent-style-name="Standard" style:list-style-name="LFO6" style:family="paragraph"/>
    <style:style style:name="P54" style:parent-style-name="Standard" style:list-style-name="LFO6" style:family="paragraph"/>
    <style:style style:name="P55" style:parent-style-name="Standard" style:list-style-name="LFO6" style:family="paragraph"/>
    <style:style style:name="P56" style:parent-style-name="Standard" style:list-style-name="LFO6" style:family="paragraph"/>
    <style:style style:name="P57" style:parent-style-name="Standard" style:list-style-name="LFO6" style:family="paragraph"/>
    <style:style style:name="P58" style:parent-style-name="Standard" style:list-style-name="LFO6" style:family="paragraph"/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list-style-name="LFO7" style:family="paragraph"/>
    <style:style style:name="P61" style:parent-style-name="Standard" style:list-style-name="LFO7" style:family="paragraph"/>
    <style:style style:name="P62" style:parent-style-name="Standard" style:list-style-name="LFO7" style:family="paragraph"/>
    <style:style style:name="P63" style:parent-style-name="Standard" style:list-style-name="LFO7" style:family="paragraph"/>
    <style:style style:name="P64" style:parent-style-name="Standard" style:list-style-name="LFO7" style:family="paragraph"/>
    <style:style style:name="P65" style:parent-style-name="Standard" style:list-style-name="LFO7" style:family="paragraph"/>
    <style:style style:name="P66" style:parent-style-name="Standard" style:list-style-name="LFO7" style:family="paragraph"/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list-style-name="LFO8" style:family="paragraph"/>
    <style:style style:name="P69" style:parent-style-name="Standard" style:list-style-name="LFO8" style:family="paragraph"/>
    <style:style style:name="P70" style:parent-style-name="Standard" style:list-style-name="LFO8" style:family="paragraph"/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list-style-name="LFO9" style:family="paragraph"/>
    <style:style style:name="P73" style:parent-style-name="Standard" style:list-style-name="LFO9" style:family="paragraph"/>
    <style:style style:name="P74" style:parent-style-name="Standard" style:list-style-name="LFO9" style:family="paragraph"/>
    <style:style style:name="P75" style:parent-style-name="Standard" style:list-style-name="LFO9" style:family="paragraph"/>
    <style:style style:name="P76" style:parent-style-name="Standard" style:list-style-name="LFO9" style:family="paragraph"/>
    <style:style style:name="P77" style:parent-style-name="Standard" style:list-style-name="LFO9" style:family="paragraph"/>
    <style:style style:name="P78" style:parent-style-name="Standard" style:list-style-name="LFO9" style:family="paragraph"/>
    <style:style style:name="P79" style:parent-style-name="Standard" style:family="paragraph">
      <style:text-properties fo:font-weight="bold" style:font-weight-asian="bold" style:font-weight-complex="bold"/>
    </style:style>
    <style:style style:name="TableColumn81" style:family="table-column">
      <style:table-column-properties style:column-width="1.9472in"/>
    </style:style>
    <style:style style:name="TableColumn82" style:family="table-column">
      <style:table-column-properties style:column-width="4.1798in"/>
    </style:style>
    <style:style style:name="Table80" style:family="table">
      <style:table-properties style:width="6.127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0" style:parent-style-name="Absatz-Standardschriftart" style:family="text">
      <style:text-properties fo:font-weight="bold" style:font-weight-asian="bold" style:font-weight-complex="bold"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4" style:parent-style-name="Absatz-Standardschriftart" style:family="text">
      <style:text-properties fo:font-weight="bold" style:font-weight-asian="bold" style:font-weight-complex="bold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8" style:parent-style-name="Absatz-Standardschriftart" style:family="text">
      <style:text-properties fo:font-weight="bold" style:font-weight-asian="bold" style:font-weight-complex="bold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2" style:parent-style-name="Absatz-Standardschriftart" style:family="text">
      <style:text-properties fo:font-weight="bold" style:font-weight-asian="bold" style:font-weight-complex="bold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6" style:parent-style-name="Absatz-Standardschriftart" style:family="text">
      <style:text-properties fo:font-weight="bold" style:font-weight-asian="bold" style:font-weight-complex="bold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0" style:parent-style-name="Absatz-Standardschriftart" style:family="text">
      <style:text-properties fo:font-weight="bold" style:font-weight-asian="bold" style:font-weight-complex="bold"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list-style-name="LFO10" style:family="paragraph"/>
    <style:style style:name="P114" style:parent-style-name="Standard" style:list-style-name="LFO10" style:family="paragraph"/>
    <style:style style:name="P115" style:parent-style-name="Standard" style:list-style-name="LFO10" style:family="paragraph"/>
    <style:style style:name="P116" style:parent-style-name="Standard" style:list-style-name="LFO10" style:family="paragraph"/>
    <style:style style:name="P117" style:parent-style-name="Standard" style:list-style-name="LFO10" style:family="paragraph"/>
    <style:style style:name="P118" style:parent-style-name="Standard" style:list-style-name="LFO10" style:family="paragraph"/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list-style-name="LFO11" style:family="paragraph"/>
    <style:style style:name="T121" style:parent-style-name="Absatz-Standardschriftart" style:family="text">
      <style:text-properties fo:font-weight="bold" style:font-weight-asian="bold" style:font-weight-complex="bold"/>
    </style:style>
    <style:style style:name="T122" style:parent-style-name="Absatz-Standardschriftart" style:family="text">
      <style:text-properties fo:font-weight="bold" style:font-weight-asian="bold" style:font-weight-complex="bold"/>
    </style:style>
    <style:style style:name="P123" style:parent-style-name="Standard" style:list-style-name="LFO11" style:family="paragraph"/>
    <style:style style:name="P124" style:parent-style-name="Standard" style:list-style-name="LFO11" style:family="paragraph"/>
    <style:style style:name="P125" style:parent-style-name="Standard" style:list-style-name="LFO11" style:family="paragraph"/>
    <style:style style:name="T126" style:parent-style-name="Absatz-Standardschriftart" style:family="text">
      <style:text-properties fo:background-color="#FFFF00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TableColumn129" style:family="table-column">
      <style:table-column-properties style:column-width="2.3951in"/>
    </style:style>
    <style:style style:name="TableColumn130" style:family="table-column">
      <style:table-column-properties style:column-width="3.9048in"/>
    </style:style>
    <style:style style:name="Table128" style:family="table">
      <style:table-properties style:width="6.3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8" style:parent-style-name="Absatz-Standardschriftart" style:family="text">
      <style:text-properties style:font-name="Wingdings" style:font-name-asian="Wingdings" style:font-name-complex="Wingdings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" style:parent-style-name="Absatz-Standardschriftart" style:family="text">
      <style:text-properties style:font-name="Wingdings" style:font-name-asian="Wingdings" style:font-name-complex="Wingdings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" style:parent-style-name="Absatz-Standardschriftart" style:family="text">
      <style:text-properties style:font-name="Wingdings" style:font-name-asian="Wingdings" style:font-name-complex="Wingdings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Mögliche Projektidee</text:p>
      <text:p text:style-name="P2">Thema</text:p>
      <text:p text:style-name="Standard"><text:span text:style-name="T3">Hypertonie, Risikofaktoren und Machine Learning: Public-Health-Trends in Europa und individuelle Risikovorhersage mit NHANES</text:span></text:p>
      <text:p text:style-name="Standard"><draw:custom-shape svg:x="0in" svg:y="0in" svg:width="45.51042in" svg:height="0.00139in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4">Datensatz</text:p>
      <text:p text:style-name="Standard"><text:span text:style-name="T5">1. WHO Global Health Observatory / WHO-Daten</text:span><text:span text:style-name="T6"><text:s/>(Ludmila)</text:span><text:line-break/>Für den Public-Health-Teil:</text:p>
      <text:list text:style-name="LFO1" text:continue-numbering="true">
        <text:list-item>
          <text:p text:style-name="P7">Hypertonie-Prävalenz<text:s/>in Deutschland<text:s/></text:p>
        </text:list-item>
        <text:list-item>
          <text:p text:style-name="P8">Geschlecht<text:s/>M,W</text:p>
        </text:list-item>
        <text:list-item>
          <text:p text:style-name="P9">mögliche Risikofaktoren<text:s/>für Hypertonie</text:p>
        </text:list-item>
        <text:list-item>
          <text:p text:style-name="P10">Zeitraum: möglichst<text:s/><text:span text:style-name="T11">1999</text:span><text:span text:style-name="T12">–2019</text:span><text:s/></text:p>
        </text:list-item>
      </text:list>
      <text:p text:style-name="Standard"><text:span text:style-name="T13">2. NHANES 2021–2023 / CDC</text:span><text:span text:style-name="T14"><text:s/>(Mahshid)</text:span><text:line-break/>Für den ML-Teil:</text:p>
      <text:list text:style-name="LFO2" text:continue-numbering="true">
        <text:list-item>
          <text:p text:style-name="P15"><text:span text:style-name="T16">BPQ_L</text:span>: Blutdruck-/Hypertonie-Fragen<text:s/></text:p>
        </text:list-item>
        <text:list-item>
          <text:p text:style-name="P17"><text:span text:style-name="T18">DEMO_L</text:span>: Alter, Geschlecht, Bildung, Einkommen<text:s/></text:p>
        </text:list-item>
        <text:list-item>
          <text:p text:style-name="P19"><text:span text:style-name="T20">BMX_L</text:span>: BMI, Gewicht, Körpermaße<text:s/></text:p>
        </text:list-item>
        <text:list-item>
          <text:p text:style-name="P21"><text:span text:style-name="T22">SMQ_L</text:span>: Rauchen<text:s/></text:p>
        </text:list-item>
        <text:list-item>
          <text:p text:style-name="P23"><text:span text:style-name="T24">ALQ_L</text:span>: Alkoholkonsum<text:s/></text:p>
        </text:list-item>
        <text:list-item>
          <text:p text:style-name="P25"><text:span text:style-name="T26">PAQ_L</text:span>: körperliche Aktivität<text:s/></text:p>
        </text:list-item>
        <text:list-item>
          <text:p text:style-name="P27">optional:<text:s/><text:span text:style-name="T28">DR1TOT_L / DR2TOT_L</text:span><text:s/>für Ernährung/Natrium<text:s/></text:p>
        </text:list-item>
      </text:list>
      <text:p text:style-name="Standard">Die NHANES-Daten können über die Personen-ID<text:s/><text:span text:style-name="T29">SEQN</text:span><text:s/>zusammengeführt werden.</text:p>
      <text:p text:style-name="Standard"><draw:custom-shape svg:x="0in" svg:y="0in" svg:width="45.51042in" svg:height="0.00139in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30">Ziel</text:p>
      <text:p text:style-name="Standard">Wir möchten Hypertonie aus zwei Perspektiven untersuchen:</text:p>
      <text:p text:style-name="Standard"><text:span text:style-name="T31">1. Public-Health-Perspektive mit WHO-Daten</text:span></text:p>
      <text:p text:style-name="Standard">Wie hat sich Hypertonie in Deutschland von<text:s/>1999<text:s/>bis 2019 entwickelt, und welche Unterschiede zeigen sich zwischen Männern und Frauen?</text:p>
      <text:p text:style-name="Standard"><text:span text:style-name="T32">2. ML-Perspektive mit NHANES-Daten</text:span></text:p>
      <text:soft-page-break/>
      <text:p text:style-name="Standard">Kann man anhand individueller Risikofaktoren wie Alter, Geschlecht, BMI, Rauchen, Alkohol und Bewegung vorhersagen, ob eine Person Hypertonie hat?</text:p>
      <text:p text:style-name="Standard"><draw:custom-shape svg:x="0in" svg:y="0in" svg:width="45.51042in" svg:height="0.00139in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33">Mögliche Analyse</text:p>
      <text:p text:style-name="P34">A) WHO-Teil: EDA und Zeitreihenanalyse</text:p>
      <text:p text:style-name="Standard">Mit Python, Pandas und Visualisierung:</text:p>
      <text:list text:style-name="LFO3" text:continue-numbering="true">
        <text:list-item>
          <text:p text:style-name="P35">Daten bereinigen<text:s/></text:p>
        </text:list-item>
        <text:list-item>
          <text:p text:style-name="P36">Zeitraum<text:s/>1999–2019 analysieren<text:s/></text:p>
        </text:list-item>
        <text:list-item>
          <text:p text:style-name="P37">Männer und Frauen vergleichen<text:s/></text:p>
        </text:list-item>
        <text:list-item>
          <text:p text:style-name="P38">Zeitreihenplots erstellen<text:s/></text:p>
        </text:list-item>
        <text:list-item>
          <text:p text:style-name="P39">optional Risikofaktoren einbauen<text:s/></text:p>
        </text:list-item>
      </text:list>
      <text:p text:style-name="Standard">Mögliche Visualisierungen:</text:p>
      <text:list text:style-name="LFO4" text:continue-numbering="true">
        <text:list-item>
          <text:p text:style-name="P40">Linienplot: Hypertonie über die Jahre<text:s/></text:p>
        </text:list-item>
        <text:list-item>
          <text:p text:style-name="P41">Linienplot: Männer vs. Frauen<text:s/></text:p>
        </text:list-item>
        <text:list-item>
          <text:p text:style-name="P42">Balkendiagramm: Länder-Vergleich<text:s/></text:p>
        </text:list-item>
        <text:list-item>
          <text:p text:style-name="P43">Gender-Gap-Plot<text:s/></text:p>
        </text:list-item>
        <text:list-item>
          <text:p text:style-name="P44">Heatmap oder Korrelationsmatrix<text:s/></text:p>
        </text:list-item>
      </text:list>
      <text:p text:style-name="Standard"><draw:custom-shape svg:x="0in" svg:y="0in" svg:width="45.51042in" svg:height="0.00139in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45">B) NHANES-Teil: EDA und Machine Learning</text:p>
      <text:p text:style-name="Standard">Mit Python und scikit-learn:</text:p>
      <text:p text:style-name="P46">Target</text:p>
      <text:p text:style-name="Standard"><text:span text:style-name="T47">Hypertonie ja/nein</text:span></text:p>
      <text:p text:style-name="Standard">Mögliche Zielvariable aus BPQ_L:</text:p>
      <text:list text:style-name="LFO5" text:continue-numbering="true">
        <text:list-item>
          <text:p text:style-name="P48">BPQ020: Wurde Ihnen jemals gesagt, dass Sie Bluthochdruck haben?<text:s/></text:p>
        </text:list-item>
        <text:list-item>
          <text:p text:style-name="P49">oder strenger: BPQ030: Wurde Ihnen das bei zwei oder mehr Arztbesuchen gesagt?<text:s/></text:p>
        </text:list-item>
      </text:list>
      <text:p text:style-name="P50">Features</text:p>
      <text:p text:style-name="Standard">Mögliche Einflussvariablen:</text:p>
      <text:list text:style-name="LFO6" text:continue-numbering="true">
        <text:list-item>
          <text:p text:style-name="P51">Alter<text:s/></text:p>
        </text:list-item>
        <text:list-item>
          <text:p text:style-name="P52">Geschlecht<text:s/></text:p>
        </text:list-item>
        <text:list-item>
          <text:p text:style-name="P53">BMI<text:s/></text:p>
        </text:list-item>
        <text:list-item>
          <text:p text:style-name="P54">Taillenumfang<text:s/></text:p>
        </text:list-item>
        <text:list-item>
          <text:p text:style-name="P55">Raucherstatus<text:s/></text:p>
        </text:list-item>
        <text:list-item>
          <text:p text:style-name="P56">Alkoholkonsum<text:s/></text:p>
        </text:list-item>
        <text:list-item>
          <text:p text:style-name="P57">körperliche Aktivität<text:s/></text:p>
        </text:list-item>
        <text:list-item>
          <text:p text:style-name="P58">optional Natriumaufnahme / Ernährung<text:s/></text:p>
        </text:list-item>
      </text:list>
      <text:p text:style-name="P59">EDA im ML-Teil<text:s/>( optional)</text:p>
      <text:list text:style-name="LFO7" text:continue-numbering="true">
        <text:list-item>
          <text:p text:style-name="P60">Verteilung von Hypertonie ja/nein<text:s/></text:p>
        </text:list-item>
        <text:list-item>
          <text:p text:style-name="P61">Alter nach Hypertonie-Status<text:s/></text:p>
        </text:list-item>
        <text:list-item>
          <text:p text:style-name="P62">BMI nach Hypertonie-Status<text:s/></text:p>
        </text:list-item>
        <text:list-item>
          <text:p text:style-name="P63">Hypertonie nach Geschlecht<text:s/></text:p>
        </text:list-item>
        <text:list-item>
          <text:p text:style-name="P64">Hypertonie nach Raucherstatus<text:s/></text:p>
        </text:list-item>
        <text:list-item>
          <text:p text:style-name="P65">Missing Values prüfen<text:s/></text:p>
        </text:list-item>
        <text:list-item>
          <text:p text:style-name="P66">Ausreißer prüfen<text:s/></text:p>
        </text:list-item>
      </text:list>
      <text:p text:style-name="P67">ML-Modelle</text:p>
      <text:list text:style-name="LFO8" text:continue-numbering="true">
        <text:list-item>
          <text:p text:style-name="P68">Logistic Regression<text:s/></text:p>
        </text:list-item>
        <text:list-item>
          <text:p text:style-name="P69">Decision Tree Classifier<text:s/></text:p>
        </text:list-item>
        <text:list-item>
          <text:p text:style-name="P70">Random Forest Classifier<text:s/></text:p>
        </text:list-item>
      </text:list>
      <text:p text:style-name="P71">Modellbewertung</text:p>
      <text:list text:style-name="LFO9" text:continue-numbering="true">
        <text:list-item>
          <text:p text:style-name="P72">Accuracy<text:s/></text:p>
        </text:list-item>
        <text:list-item>
          <text:p text:style-name="P73">Precision<text:s/></text:p>
        </text:list-item>
        <text:list-item>
          <text:p text:style-name="P74">Recall<text:s/></text:p>
        </text:list-item>
        <text:list-item>
          <text:p text:style-name="P75">F1-Score<text:s/></text:p>
        </text:list-item>
        <text:list-item>
          <text:p text:style-name="P76">ROC-AUC<text:s/></text:p>
        </text:list-item>
        <text:list-item>
          <text:p text:style-name="P77">Confusion Matrix<text:s/></text:p>
        </text:list-item>
        <text:list-item>
          <text:p text:style-name="P78">Feature Importance<text:s/></text:p>
        </text:list-item>
      </text:list>
      <text:p text:style-name="Standard">Ziel des ML-Teils:</text:p>
      <text:p text:style-name="Standard">Herausfinden, welche individuellen Faktoren im Modell am stärksten mit Hypertonie zusammenhängen.</text:p>
      <text:p text:style-name="Standard"><draw:custom-shape svg:x="0in" svg:y="0in" svg:width="45.51042in" svg:height="0.00139in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79">Streamlit-Dashboard- Präsentation für Hintergrund</text:p>
      <text:p text:style-name="Standard">Das Dashboard kann beide Bereiche zeigen:</text:p>
      <table:table table:style-name="Table80">
        <table:table-columns>
          <table:table-column table:style-name="TableColumn81"/>
          <table:table-column table:style-name="TableColumn82"/>
        </table:table-columns>
        <table:table-header-rows>
          <table:table-row table:style-name="TableRow83">
            <table:table-cell table:style-name="TableCell84">
              <text:p text:style-name="P85">Tab</text:p>
            </table:table-cell>
            <table:table-cell table:style-name="TableCell86">
              <text:p text:style-name="P87">Inhalt</text:p>
            </table:table-cell>
          </table:table-row>
        </table:table-header-rows>
        <table:table-row table:style-name="TableRow88">
          <table:table-cell table:style-name="TableCell89">
            <text:p text:style-name="Standard"><text:span text:style-name="T90">1. Überblick</text:span></text:p>
          </table:table-cell>
          <table:table-cell table:style-name="TableCell91">
            <text:p text:style-name="Standard">Projektziel, Datenquellen, medizinische Relevanz</text:p>
          </table:table-cell>
        </table:table-row>
        <table:table-row table:style-name="TableRow92">
          <table:table-cell table:style-name="TableCell93">
            <text:p text:style-name="Standard"><text:span text:style-name="T94">2. WHO-Zeitreihe</text:span></text:p>
          </table:table-cell>
          <table:table-cell table:style-name="TableCell95">
            <text:p text:style-name="Standard">Hypertonie in Deutschland<text:s/></text:p>
          </table:table-cell>
        </table:table-row>
        <table:table-row table:style-name="TableRow96">
          <table:table-cell table:style-name="TableCell97">
            <text:p text:style-name="Standard"><text:span text:style-name="T98">3. Geschlechtervergleich</text:span></text:p>
          </table:table-cell>
          <table:table-cell table:style-name="TableCell99">
            <text:p text:style-name="Standard">Männer/Frauen, Gender Gap</text:p>
          </table:table-cell>
        </table:table-row>
        <table:table-row table:style-name="TableRow100">
          <table:table-cell table:style-name="TableCell101">
            <text:p text:style-name="Standard"><text:span text:style-name="T102">4. Risikofaktoren</text:span></text:p>
          </table:table-cell>
          <table:table-cell table:style-name="TableCell103">
            <text:p text:style-name="Standard">Zusammenhang mit BMI, Alkohol, Bewegung usw.</text:p>
          </table:table-cell>
        </table:table-row>
        <table:table-row table:style-name="TableRow104">
          <table:table-cell table:style-name="TableCell105">
            <text:p text:style-name="Standard"><text:span text:style-name="T106">5. NHANES-ML</text:span></text:p>
          </table:table-cell>
          <table:table-cell table:style-name="TableCell107">
            <text:p text:style-name="Standard">Modell-Ergebnisse, Confusion Matrix, Feature Importance</text:p>
          </table:table-cell>
        </table:table-row>
        <table:table-row table:style-name="TableRow108">
          <table:table-cell table:style-name="TableCell109">
            <text:p text:style-name="Standard"><text:span text:style-name="T110">6. Fazit</text:span></text:p>
          </table:table-cell>
          <table:table-cell table:style-name="TableCell111">
            <text:p text:style-name="Standard">wichtigste Erkenntnisse und Limitationen</text:p>
          </table:table-cell>
        </table:table-row>
      </table:table>
      <text:p text:style-name="Standard"/>
      <text:p text:style-name="P112">Vorteil</text:p>
      <text:p text:style-name="Standard">Das Projekt ist gut machbar, weil:</text:p>
      <text:list text:style-name="LFO10" text:continue-numbering="true">
        <text:list-item>
          <text:p text:style-name="P113">Hypertonie medizinisch sehr relevant ist<text:s/></text:p>
        </text:list-item>
        <text:list-item>
          <text:p text:style-name="P114">WHO-Daten gut für Ländervergleich und Zeitreihe geeignet sind<text:s/></text:p>
        </text:list-item>
        <text:list-item>
          <text:p text:style-name="P115">NHANES-Daten besser für Machine Learning geeignet sind<text:s/></text:p>
        </text:list-item>
        <text:list-item>
          <text:p text:style-name="P116">klare Trennung zwischen Public-Health-Analyse und ML besteht<text:s/></text:p>
        </text:list-item>
        <text:list-item>
          <text:p text:style-name="P117">EDA, Statistik, ML und Streamlit sinnvoll eingesetzt werden können<text:s/></text:p>
        </text:list-item>
        <text:list-item>
          <text:p text:style-name="P118">die Story logisch ist:<text:s/></text:p>
        </text:list-item>
      </text:list>
      <text:p text:style-name="Standard">Risikofaktoren<text:line-break/>→ Hypertonie<text:line-break/>→ Herz-Kreislauf-Risiko</text:p>
      <text:p text:style-name="Standard"><draw:custom-shape svg:x="0in" svg:y="0in" svg:width="45.51042in" svg:height="0.00139in" draw:id="id5" draw:style-name="a5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P119">Risiko</text:p>
      <text:p text:style-name="Standard">Mögliche Herausforderungen:</text:p>
      <text:list text:style-name="LFO11" text:continue-numbering="true">
        <text:list-item>
          <text:p text:style-name="P120">WHO-Daten und NHANES-Daten dürfen nicht direkt vermischt werden, weil sie unterschiedliche Ebenen haben<text:line-break/><text:span text:style-name="T121">WHO = Länder/Jahre</text:span><text:line-break/><text:span text:style-name="T122">NHANES = einzelne Personen</text:span><text:s/></text:p>
        </text:list-item>
        <text:list-item>
          <text:p text:style-name="P123">einige NHANES-Variablen haben fehlende Werte oder spezielle Codes wie „Don’t know“ / „Refused“<text:s/></text:p>
        </text:list-item>
        <text:list-item>
          <text:p text:style-name="P124">ML-Modell ist keine medizinische Diagnose<text:s/></text:p>
        </text:list-item>
        <text:list-item>
          <text:p text:style-name="P125">bei aggregierten WHO-Daten gilt:<text:s/><text:span text:style-name="T126">Korrelation bedeutet nicht Kausalität</text:span><text:s/></text:p>
        </text:list-item>
      </text:list>
      <text:p text:style-name="Standard"><draw:custom-shape svg:x="0in" svg:y="0in" svg:width="45.51042in" svg:height="0.00139in" draw:id="id6" draw:style-name="a6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P127">Aufgabenverteilung</text:p>
      <table:table table:style-name="Table128">
        <table:table-columns>
          <table:table-column table:style-name="TableColumn129"/>
          <table:table-column table:style-name="TableColumn130"/>
        </table:table-columns>
        <table:table-header-rows>
          <table:table-row table:style-name="TableRow131">
            <table:table-cell table:style-name="TableCell132">
              <text:p text:style-name="P133">Person</text:p>
            </table:table-cell>
            <table:table-cell table:style-name="TableCell134">
              <text:p text:style-name="P135">Aufgabe</text:p>
            </table:table-cell>
          </table:table-row>
        </table:table-header-rows>
        <table:table-row table:style-name="TableRow136">
          <table:table-cell table:style-name="TableCell137">
            <text:p text:style-name="Standard">Person 1<text:span text:style-name="T138"></text:span></text:p>
          </table:table-cell>
          <table:table-cell table:style-name="TableCell139">
            <text:p text:style-name="Standard">WHO-Daten bereinigen, Länder/Jahre/Geschlecht filtern, Zeitreihe</text:p>
          </table:table-cell>
        </table:table-row>
        <table:table-row table:style-name="TableRow140">
          <table:table-cell table:style-name="TableCell141">
            <text:p text:style-name="Standard">Person 2<text:span text:style-name="T142"></text:span></text:p>
          </table:table-cell>
          <table:table-cell table:style-name="TableCell143">
            <text:p text:style-name="Standard">NHANES-Daten vorbereiten und ML-Modell bauen</text:p>
          </table:table-cell>
        </table:table-row>
        <table:table-row table:style-name="TableRow144">
          <table:table-cell table:style-name="TableCell145">
            <text:p text:style-name="Standard">Person 3<text:span text:style-name="T146"></text:span></text:p>
          </table:table-cell>
          <table:table-cell table:style-name="TableCell147">
            <text:p text:style-name="Standard">Streamlit-Dashboard und Präsent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shid Ghasempour Moghaddam</meta:initial-creator>
    <dc:creator>Mahshid Ghasempour Moghaddam</dc:creator>
    <meta:creation-date>2026-05-21T09:07:00Z</meta:creation-date>
    <dc:date>2026-05-21T09:07:00Z</dc:date>
    <meta:template xlink:href="Normal" xlink:type="simple"/>
    <meta:editing-cycles>2</meta:editing-cycles>
    <meta:editing-duration>PT0S</meta:editing-duration>
    <meta:document-statistic meta:page-count="5" meta:paragraph-count="8" meta:word-count="551" meta:character-count="4016" meta:row-count="28" meta:non-whitespace-character-count="3473"/>
  </office:meta>
</office:document-meta>
</file>